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A000015D1198855A640FF64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2139in" fo:margin-left="-0.0208in" fo:margin-top="0in" fo:margin-bottom="0in" table:align="left" style:may-break-between-rows="true" style:writing-mode="page" table:border-model="collapsing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0.4313in"/>
    </style:style>
    <style:style style:name="Table1.C" style:family="table-column">
      <style:table-column-properties style:column-width="0.7236in"/>
    </style:style>
    <style:style style:name="Table1.D" style:family="table-column">
      <style:table-column-properties style:column-width="0.7667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 style:data-style-name="N129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B14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74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4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4" style:family="table-cell" style:data-style-name="N129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" style:master-page-name="">
      <loext:graphic-properties draw:fill-gradient-name="gradient" draw:fill-hatch-name="hatch"/>
      <style:paragraph-properties style:page-number="auto" fo:break-before="page"/>
      <style:text-properties officeooo:paragraph-rsid="0004e7db"/>
    </style:style>
    <style:style style:name="P2" style:family="paragraph" style:parent-style-name="Text_20_body">
      <style:text-properties officeooo:rsid="0015f845" officeooo:paragraph-rsid="0004e7db"/>
    </style:style>
    <style:style style:name="P3" style:family="paragraph" style:parent-style-name="Text_20_body">
      <style:text-properties officeooo:rsid="001f7b96" officeooo:paragraph-rsid="0004e7db"/>
    </style:style>
    <style:style style:name="P4" style:family="paragraph" style:parent-style-name="Text_20_body">
      <style:text-properties officeooo:rsid="0020c924" officeooo:paragraph-rsid="0004e7db"/>
    </style:style>
    <style:style style:name="P5" style:family="paragraph" style:parent-style-name="Text_20_body">
      <style:text-properties officeooo:rsid="0007c9d0" officeooo:paragraph-rsid="0004e7db"/>
    </style:style>
    <style:style style:name="P6" style:family="paragraph" style:parent-style-name="Text_20_body">
      <style:text-properties officeooo:rsid="000f3624" officeooo:paragraph-rsid="001860d6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P8" style:family="paragraph" style:parent-style-name="Table_20_Heading">
      <style:text-properties fo:font-size="10pt" officeooo:paragraph-rsid="0024f130" style:font-size-asian="10pt" style:font-size-complex="10pt"/>
    </style:style>
    <style:style style:name="P9" style:family="paragraph" style:parent-style-name="Table_20_Heading">
      <style:text-properties fo:font-size="10pt" officeooo:rsid="0024f130" officeooo:paragraph-rsid="0024f130" style:font-size-asian="10pt" style:font-size-complex="10pt"/>
    </style:style>
    <style:style style:name="P10" style:family="paragraph" style:parent-style-name="Heading_20_2">
      <style:text-properties officeooo:paragraph-rsid="001932f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62afb"/>
    </style:style>
    <style:style style:name="T2" style:family="text">
      <style:text-properties officeooo:rsid="001b7d34"/>
    </style:style>
    <style:style style:name="T3" style:family="text">
      <style:text-properties officeooo:rsid="001d0316"/>
    </style:style>
    <style:style style:name="T4" style:family="text">
      <style:text-properties officeooo:rsid="001d6d62"/>
    </style:style>
    <style:style style:name="T5" style:family="text">
      <style:text-properties officeooo:rsid="001fb43d"/>
    </style:style>
    <style:style style:name="T6" style:family="text">
      <style:text-properties officeooo:rsid="0020c924"/>
    </style:style>
    <style:style style:name="T7" style:family="text">
      <style:text-properties officeooo:rsid="00148119"/>
    </style:style>
    <style:style style:name="T8" style:family="text">
      <style:text-properties officeooo:rsid="001860d6"/>
    </style:style>
    <style:style style:name="T9" style:family="text">
      <style:text-properties officeooo:rsid="001932fe"/>
    </style:style>
    <style:style style:name="T10" style:family="text">
      <style:text-properties officeooo:rsid="001a0427"/>
    </style:style>
    <style:style style:name="T11" style:family="text">
      <style:text-properties officeooo:rsid="001e93a7"/>
    </style:style>
    <style:style style:name="T12" style:family="text">
      <style:text-properties officeooo:rsid="0024f130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office:annotation office:name="__Annotation__17538_2124384943" loext:resolved="false"><dc:creator>Tate Shannon</dc:creator><dc:date>2023-02-26T00:48:05.931000000</dc:date><meta:creator-initials>TS</meta:creator-initials><text:p text:style-name="P11"><text:span text:style-name="T13">Need to add a section discussing octave and tones. Preferably before introducing the specifications!</text:span></text:p></office:annotation>Drawing a scale for your pipes<office:annotation-end office:name="__Annotation__17538_2124384943"/></text:h>
      <text:p text:style-name="P2">Before you make your pipes, you need to make a “scale” for them. <text:span text:style-name="T1">Contrary to expectation, scaling pipes equally in all dimensions results in an unpleasant result: the pipes </text:span><text:span text:style-name="T2">of different pitches will</text:span><text:span text:style-name="T1"> speak with wildly differing volumes </text:span><text:span text:style-name="T2">and </text:span><text:span text:style-name="T3">timbres. Because of this, </text:span><text:span text:style-name="T4">organ designers have come up with clever “scales” that, when utilized, result in pipes that sound consistent across the full range of human hearing.</text:span></text:p>
      <text:p text:style-name="P3">In his original book, Wicks provided detailed instructions for drawing your own scale. I have reproduced the resulting scale in Figure <text:sequence-ref text:reference-format="value" text:ref-name="refFigure0">1</text:sequence-ref>. If that figure doesn’t make much sense to you, spend some time looking at Table <text:sequence-ref text:reference-format="value" text:ref-name="refTable0">1</text:sequence-ref><text:s/><text:span text:style-name="T5">which contains all the necessary dimensions, no need for a scale. </text:span></text:p>
      <text:p text:style-name="P3"><text:span text:style-name="T5">However, having the scale drawn out full-sized is very handy. If</text:span> you want to reproduce it, begin by drawing the long, vertical 54” line, then break that line into a 2’ section, followed by 1’, 6”, 3”, 1-1/2”, and 3/4”. After that, draw the 2-5/8” line perpendicular to the long line at the top of the 2’ section. Connect the two perpendicular lines to form a right triangle. Break the 2’ section into chunks of 2”, the 1’ section into chunks of 1”, the 6” into 1/2”, the 3” into 1/4”, the 1-1/2” into 1/8”, and, finally, the 3/4” into 1/16” sections. <text:span text:style-name="T6">Draw another horizontal line 6” from the narrow tip of the triangle to mark the position of the mouth for all the pipes. </text:span></text:p>
      <text:p text:style-name="P4">Each horizontal line represents the top of one pipe. The lowest two octaves of the scale are labeled with their respective pitches. The rest of the octaves only have C labeled, but the pitches go in the same order.</text:p>
      <text:p text:style-name="P3"/>
      <text:p text:style-name="P5"><text:soft-page-break/><draw:frame draw:style-name="fr1" draw:name="Frame1" text:anchor-type="as-char" svg:width="1.2764in" draw:z-index="0"><draw:text-box fo:min-height="7.1071in"><text:p text:style-name="Figure"><draw:frame draw:style-name="fr2" draw:name="Image1" text:anchor-type="paragraph" svg:width="1.2764in" style:rel-width="100%" svg:height="6.3091in" style:rel-height="scale" draw:z-index="1"><draw:image xlink:href="Pictures/100000010000046A000015D1198855A640FF6403.png" xlink:type="simple" xlink:show="embed" xlink:actuate="onLoad" draw:mime-type="image/png"/></draw:frame>Figure <text:sequence text:ref-name="refFigure0" text:name="Figure" text:formula="ooow:Figure+1" style:num-format="1">1</text:sequence>: Wicks' organ pipe scale. <text:span text:style-name="T4">All dimensions in inches.</text:span></text:p></draw:text-box></draw:frame></text:p>
      <text:section text:style-name="Sect1" text:name="Section1">
        <text:p text:style-name="P1">Table <text:sequence text:ref-name="refTable0" text:name="Table" text:formula="ooow:Table+1" style:num-format="1">1</text:sequence>: <text:span text:style-name="T11">Scale for pipe lengths</text:span></text:p>
        <table:table table:name="Table1" table:style-name="Table1" table:template-name="Academic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7">Note </text:p>
            </table:table-cell>
            <table:table-cell table:style-name="Table1.A1" office:value-type="string">
              <text:p text:style-name="P7">Octave</text:p>
            </table:table-cell>
            <table:table-cell table:style-name="Table1.A1" office:value-type="string">
              <text:p text:style-name="P7">Total length<text:line-break/>(inch)</text:p>
            </table:table-cell>
            <table:table-cell table:style-name="Table1.A1" office:value-type="string">
              <text:p text:style-name="P9">Speaking</text:p>
              <text:p text:style-name="P8"><text:span text:style-name="T12">length </text:span>(inch)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54">
              <text:p text:style-name="long_20_table">54 <text:s text:c="5"/></text:p>
            </table:table-cell>
            <table:table-cell table:style-name="Table1.C2" office:value-type="float" office:value="48">
              <text:p text:style-name="long_20_table">48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52">
              <text:p text:style-name="long_20_table">52 <text:s text:c="5"/></text:p>
            </table:table-cell>
            <table:table-cell table:style-name="Table1.C2" office:value-type="float" office:value="46">
              <text:p text:style-name="long_20_table">46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50">
              <text:p text:style-name="long_20_table">50 <text:s text:c="5"/></text:p>
            </table:table-cell>
            <table:table-cell table:style-name="Table1.C2" office:value-type="float" office:value="44">
              <text:p text:style-name="long_20_table">44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48">
              <text:p text:style-name="long_20_table">48 <text:s text:c="5"/></text:p>
            </table:table-cell>
            <table:table-cell table:style-name="Table1.C2" office:value-type="float" office:value="42">
              <text:p text:style-name="long_20_table">42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46">
              <text:p text:style-name="long_20_table">46 <text:s text:c="5"/></text:p>
            </table:table-cell>
            <table:table-cell table:style-name="Table1.C2" office:value-type="float" office:value="40">
              <text:p text:style-name="long_20_table">40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44">
              <text:p text:style-name="long_20_table">44 <text:s text:c="5"/></text:p>
            </table:table-cell>
            <table:table-cell table:style-name="Table1.C2" office:value-type="float" office:value="38">
              <text:p text:style-name="long_20_table">38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42">
              <text:p text:style-name="long_20_table">42 <text:s text:c="5"/></text:p>
            </table:table-cell>
            <table:table-cell table:style-name="Table1.C2" office:value-type="float" office:value="36">
              <text:p text:style-name="long_20_table">36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40">
              <text:p text:style-name="long_20_table">40 <text:s text:c="5"/></text:p>
            </table:table-cell>
            <table:table-cell table:style-name="Table1.C2" office:value-type="float" office:value="34">
              <text:p text:style-name="long_20_table">34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38">
              <text:p text:style-name="long_20_table">38 <text:s text:c="5"/></text:p>
            </table:table-cell>
            <table:table-cell table:style-name="Table1.C2" office:value-type="float" office:value="32">
              <text:p text:style-name="long_20_table">32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36">
              <text:p text:style-name="long_20_table">36 <text:s text:c="5"/></text:p>
            </table:table-cell>
            <table:table-cell table:style-name="Table1.C2" office:value-type="float" office:value="30">
              <text:p text:style-name="long_20_table">30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34">
              <text:p text:style-name="long_20_table">34 <text:s text:c="5"/></text:p>
            </table:table-cell>
            <table:table-cell table:style-name="Table1.C2" office:value-type="float" office:value="28">
              <text:p text:style-name="long_20_table">28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A2" office:value-type="string">
              <text:p text:style-name="long_20_table">2-3</text:p>
            </table:table-cell>
            <table:table-cell table:style-name="Table1.C2" office:value-type="float" office:value="32">
              <text:p text:style-name="long_20_table">32 <text:s text:c="5"/></text:p>
            </table:table-cell>
            <table:table-cell table:style-name="Table1.C2" office:value-type="float" office:value="26">
              <text:p text:style-name="long_20_table">26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30">
              <text:p text:style-name="long_20_table">30 <text:s text:c="5"/></text:p>
            </table:table-cell>
            <table:table-cell table:style-name="Table1.C2" office:value-type="float" office:value="24">
              <text:p text:style-name="long_20_table">24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9">
              <text:p text:style-name="long_20_table">29 <text:s text:c="5"/></text:p>
            </table:table-cell>
            <table:table-cell table:style-name="Table1.C2" office:value-type="float" office:value="23">
              <text:p text:style-name="long_20_table">23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8">
              <text:p text:style-name="long_20_table">28 <text:s text:c="5"/></text:p>
            </table:table-cell>
            <table:table-cell table:style-name="Table1.C2" office:value-type="float" office:value="22">
              <text:p text:style-name="long_20_table">22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7">
              <text:p text:style-name="long_20_table">27 <text:s text:c="5"/></text:p>
            </table:table-cell>
            <table:table-cell table:style-name="Table1.C2" office:value-type="float" office:value="21">
              <text:p text:style-name="long_20_table">21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6">
              <text:p text:style-name="long_20_table">26 <text:s text:c="5"/></text:p>
            </table:table-cell>
            <table:table-cell table:style-name="Table1.C2" office:value-type="float" office:value="20">
              <text:p text:style-name="long_20_table">20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5">
              <text:p text:style-name="long_20_table">25 <text:s text:c="5"/></text:p>
            </table:table-cell>
            <table:table-cell table:style-name="Table1.C2" office:value-type="float" office:value="19">
              <text:p text:style-name="long_20_table">19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4">
              <text:p text:style-name="long_20_table">24 <text:s text:c="5"/></text:p>
            </table:table-cell>
            <table:table-cell table:style-name="Table1.C2" office:value-type="float" office:value="18">
              <text:p text:style-name="long_20_table">18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3">
              <text:p text:style-name="long_20_table">23 <text:s text:c="5"/></text:p>
            </table:table-cell>
            <table:table-cell table:style-name="Table1.C2" office:value-type="float" office:value="17">
              <text:p text:style-name="long_20_table">17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2">
              <text:p text:style-name="long_20_table">22 <text:s text:c="5"/></text:p>
            </table:table-cell>
            <table:table-cell table:style-name="Table1.C2" office:value-type="float" office:value="16">
              <text:p text:style-name="long_20_table">16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1">
              <text:p text:style-name="long_20_table">21 <text:s text:c="5"/></text:p>
            </table:table-cell>
            <table:table-cell table:style-name="Table1.C2" office:value-type="float" office:value="15">
              <text:p text:style-name="long_20_table">15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20">
              <text:p text:style-name="long_20_table">20 <text:s text:c="5"/></text:p>
            </table:table-cell>
            <table:table-cell table:style-name="Table1.C2" office:value-type="float" office:value="14">
              <text:p text:style-name="long_20_table">14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B14" office:value-type="float" office:value="4">
              <text:p text:style-name="long_20_table">4</text:p>
            </table:table-cell>
            <table:table-cell table:style-name="Table1.C2" office:value-type="float" office:value="19">
              <text:p text:style-name="long_20_table">19 <text:s text:c="5"/></text:p>
            </table:table-cell>
            <table:table-cell table:style-name="Table1.C2" office:value-type="float" office:value="13">
              <text:p text:style-name="long_20_table">13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8">
              <text:p text:style-name="long_20_table">18 <text:s text:c="5"/></text:p>
            </table:table-cell>
            <table:table-cell table:style-name="Table1.C2" office:value-type="float" office:value="12">
              <text:p text:style-name="long_20_table">12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7.5">
              <text:p text:style-name="long_20_table">17 <text:s/>1/2 </text:p>
            </table:table-cell>
            <table:table-cell table:style-name="Table1.C2" office:value-type="float" office:value="11.5">
              <text:p text:style-name="long_20_table">11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7">
              <text:p text:style-name="long_20_table">17 <text:s text:c="5"/></text:p>
            </table:table-cell>
            <table:table-cell table:style-name="Table1.C2" office:value-type="float" office:value="11">
              <text:p text:style-name="long_20_table">11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6.5">
              <text:p text:style-name="long_20_table">16 <text:s/>1/2 </text:p>
            </table:table-cell>
            <table:table-cell table:style-name="Table1.C2" office:value-type="float" office:value="10.5">
              <text:p text:style-name="long_20_table">10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6">
              <text:p text:style-name="long_20_table">16 <text:s text:c="5"/></text:p>
            </table:table-cell>
            <table:table-cell table:style-name="Table1.C2" office:value-type="float" office:value="10">
              <text:p text:style-name="long_20_table">10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5.5">
              <text:p text:style-name="long_20_table">15 <text:s/>1/2 </text:p>
            </table:table-cell>
            <table:table-cell table:style-name="Table1.C2" office:value-type="float" office:value="9.5">
              <text:p text:style-name="long_20_table">9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5">
              <text:p text:style-name="long_20_table">15 <text:s text:c="5"/></text:p>
            </table:table-cell>
            <table:table-cell table:style-name="Table1.C2" office:value-type="float" office:value="9">
              <text:p text:style-name="long_20_table">9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4.5">
              <text:p text:style-name="long_20_table">14 <text:s/>1/2 </text:p>
            </table:table-cell>
            <table:table-cell table:style-name="Table1.C2" office:value-type="float" office:value="8.5">
              <text:p text:style-name="long_20_table">8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4">
              <text:p text:style-name="long_20_table">14 <text:s text:c="5"/></text:p>
            </table:table-cell>
            <table:table-cell table:style-name="Table1.C2" office:value-type="float" office:value="8">
              <text:p text:style-name="long_20_table">8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3.5">
              <text:p text:style-name="long_20_table">13 <text:s/>1/2 </text:p>
            </table:table-cell>
            <table:table-cell table:style-name="Table1.C2" office:value-type="float" office:value="7.5">
              <text:p text:style-name="long_20_table">7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3">
              <text:p text:style-name="long_20_table">13 <text:s text:c="5"/></text:p>
            </table:table-cell>
            <table:table-cell table:style-name="Table1.C2" office:value-type="float" office:value="7">
              <text:p text:style-name="long_20_table">7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B14" office:value-type="float" office:value="5">
              <text:p text:style-name="long_20_table">5</text:p>
            </table:table-cell>
            <table:table-cell table:style-name="Table1.C2" office:value-type="float" office:value="12.5">
              <text:p text:style-name="long_20_table">12 <text:s/>1/2 </text:p>
            </table:table-cell>
            <table:table-cell table:style-name="Table1.C2" office:value-type="float" office:value="6.5">
              <text:p text:style-name="long_20_table">6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2">
              <text:p text:style-name="long_20_table">12 <text:s text:c="5"/></text:p>
            </table:table-cell>
            <table:table-cell table:style-name="Table1.C2" office:value-type="float" office:value="6">
              <text:p text:style-name="long_20_table">6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1.75">
              <text:p text:style-name="long_20_table">11 <text:s/>3/4 </text:p>
            </table:table-cell>
            <table:table-cell table:style-name="Table1.C2" office:value-type="float" office:value="5.75">
              <text:p text:style-name="long_20_table">5 <text:s/>3/4 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1.5">
              <text:p text:style-name="long_20_table">11 <text:s/>1/2 </text:p>
            </table:table-cell>
            <table:table-cell table:style-name="Table1.C2" office:value-type="float" office:value="5.5">
              <text:p text:style-name="long_20_table">5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1.25">
              <text:p text:style-name="long_20_table">11 <text:s/>1/4 </text:p>
            </table:table-cell>
            <table:table-cell table:style-name="Table1.C2" office:value-type="float" office:value="5.25">
              <text:p text:style-name="long_20_table">5 <text:s/>1/4 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1">
              <text:p text:style-name="long_20_table">11 <text:s text:c="5"/></text:p>
            </table:table-cell>
            <table:table-cell table:style-name="Table1.C2" office:value-type="float" office:value="5">
              <text:p text:style-name="long_20_table">5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0.75">
              <text:p text:style-name="long_20_table">10 <text:s/>3/4 </text:p>
            </table:table-cell>
            <table:table-cell table:style-name="Table1.C2" office:value-type="float" office:value="4.75">
              <text:p text:style-name="long_20_table">4 <text:s/>3/4 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0.5">
              <text:p text:style-name="long_20_table">10 <text:s/>1/2 </text:p>
            </table:table-cell>
            <table:table-cell table:style-name="Table1.C2" office:value-type="float" office:value="4.5">
              <text:p text:style-name="long_20_table">4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0.25">
              <text:p text:style-name="long_20_table">10 <text:s/>1/4 </text:p>
            </table:table-cell>
            <table:table-cell table:style-name="Table1.C2" office:value-type="float" office:value="4.25">
              <text:p text:style-name="long_20_table">4 <text:s/>1/4 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10">
              <text:p text:style-name="long_20_table">10 <text:s text:c="5"/></text:p>
            </table:table-cell>
            <table:table-cell table:style-name="Table1.C2" office:value-type="float" office:value="4">
              <text:p text:style-name="long_20_table">4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9.75">
              <text:p text:style-name="long_20_table">9 <text:s/>3/4 </text:p>
            </table:table-cell>
            <table:table-cell table:style-name="Table1.C2" office:value-type="float" office:value="3.75">
              <text:p text:style-name="long_20_table">3 <text:s/>3/4 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9.5">
              <text:p text:style-name="long_20_table">9 <text:s/>1/2 </text:p>
            </table:table-cell>
            <table:table-cell table:style-name="Table1.C2" office:value-type="float" office:value="3.5">
              <text:p text:style-name="long_20_table">3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B14" office:value-type="float" office:value="6">
              <text:p text:style-name="long_20_table">6</text:p>
            </table:table-cell>
            <table:table-cell table:style-name="Table1.C2" office:value-type="float" office:value="9.25">
              <text:p text:style-name="long_20_table">9 <text:s/>1/4 </text:p>
            </table:table-cell>
            <table:table-cell table:style-name="Table1.C2" office:value-type="float" office:value="3.25">
              <text:p text:style-name="long_20_table">3 <text:s/>1/4 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9">
              <text:p text:style-name="long_20_table">9 <text:s text:c="5"/></text:p>
            </table:table-cell>
            <table:table-cell table:style-name="Table1.C2" office:value-type="float" office:value="3">
              <text:p text:style-name="long_20_table">3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875">
              <text:p text:style-name="long_20_table">8 <text:s/>7/8 </text:p>
            </table:table-cell>
            <table:table-cell table:style-name="Table1.C2" office:value-type="float" office:value="2.875">
              <text:p text:style-name="long_20_table">2 <text:s/>7/8 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75">
              <text:p text:style-name="long_20_table">8 <text:s/>3/4 </text:p>
            </table:table-cell>
            <table:table-cell table:style-name="Table1.C2" office:value-type="float" office:value="2.75">
              <text:p text:style-name="long_20_table">2 <text:s/>3/4 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625">
              <text:p text:style-name="long_20_table">8 <text:s/>5/8 </text:p>
            </table:table-cell>
            <table:table-cell table:style-name="Table1.C2" office:value-type="float" office:value="2.625">
              <text:p text:style-name="long_20_table">2 <text:s/>5/8 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5">
              <text:p text:style-name="long_20_table">8 <text:s/>1/2 </text:p>
            </table:table-cell>
            <table:table-cell table:style-name="Table1.C2" office:value-type="float" office:value="2.5">
              <text:p text:style-name="long_20_table">2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375">
              <text:p text:style-name="long_20_table">8 <text:s/>3/8 </text:p>
            </table:table-cell>
            <table:table-cell table:style-name="Table1.C2" office:value-type="float" office:value="2.375">
              <text:p text:style-name="long_20_table">2 <text:s/>3/8 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25">
              <text:p text:style-name="long_20_table">8 <text:s/>1/4 </text:p>
            </table:table-cell>
            <table:table-cell table:style-name="Table1.C2" office:value-type="float" office:value="2.25">
              <text:p text:style-name="long_20_table">2 <text:s/>1/4 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.125">
              <text:p text:style-name="long_20_table">8 <text:s/>1/8 </text:p>
            </table:table-cell>
            <table:table-cell table:style-name="Table1.C2" office:value-type="float" office:value="2.125">
              <text:p text:style-name="long_20_table">2 <text:s/>1/8 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8">
              <text:p text:style-name="long_20_table">8 <text:s text:c="5"/></text:p>
            </table:table-cell>
            <table:table-cell table:style-name="Table1.C2" office:value-type="float" office:value="2">
              <text:p text:style-name="long_20_table">2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7.875">
              <text:p text:style-name="long_20_table">7 <text:s/>7/8 </text:p>
            </table:table-cell>
            <table:table-cell table:style-name="Table1.C2" office:value-type="float" office:value="1.875">
              <text:p text:style-name="long_20_table">1 <text:s/>7/8 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7.75">
              <text:p text:style-name="long_20_table">7 <text:s/>3/4 </text:p>
            </table:table-cell>
            <table:table-cell table:style-name="Table1.C2" office:value-type="float" office:value="1.75">
              <text:p text:style-name="long_20_table">1 <text:s/>3/4 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B14" office:value-type="float" office:value="7">
              <text:p text:style-name="long_20_table">7</text:p>
            </table:table-cell>
            <table:table-cell table:style-name="Table1.C2" office:value-type="float" office:value="7.625">
              <text:p text:style-name="long_20_table">7 <text:s/>5/8 </text:p>
            </table:table-cell>
            <table:table-cell table:style-name="Table1.C2" office:value-type="float" office:value="1.625">
              <text:p text:style-name="long_20_table">1 <text:s/>5/8 </text:p>
            </table:table-cell>
          </table:table-row>
          <table:table-row table:style-name="Table1.2">
            <table:table-cell table:style-name="Table1.A2" office:value-type="string">
              <text:p text:style-name="long_20_table">C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5">
              <text:p text:style-name="long_20_table">7 <text:s/>1/2 </text:p>
            </table:table-cell>
            <table:table-cell table:style-name="Table1.C2" office:value-type="float" office:value="1.5">
              <text:p text:style-name="long_20_table">1 <text:s/>1/2 </text:p>
            </table:table-cell>
          </table:table-row>
          <table:table-row table:style-name="Table1.2">
            <table:table-cell table:style-name="Table1.A2" office:value-type="string">
              <text:p text:style-name="long_20_table">C#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4375">
              <text:p text:style-name="long_20_table">7 <text:s/>7/16</text:p>
            </table:table-cell>
            <table:table-cell table:style-name="Table1.C2" office:value-type="float" office:value="1.4375">
              <text:p text:style-name="long_20_table">1 <text:s/>7/16</text:p>
            </table:table-cell>
          </table:table-row>
          <table:table-row table:style-name="Table1.2">
            <table:table-cell table:style-name="Table1.A2" office:value-type="string">
              <text:p text:style-name="long_20_table">D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375">
              <text:p text:style-name="long_20_table">7 <text:s/>3/8 </text:p>
            </table:table-cell>
            <table:table-cell table:style-name="Table1.C2" office:value-type="float" office:value="1.375">
              <text:p text:style-name="long_20_table">1 <text:s/>3/8 </text:p>
            </table:table-cell>
          </table:table-row>
          <table:table-row table:style-name="Table1.2">
            <table:table-cell table:style-name="Table1.A2" office:value-type="string">
              <text:p text:style-name="long_20_table">D#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3125">
              <text:p text:style-name="long_20_table">7 <text:s/>5/16</text:p>
            </table:table-cell>
            <table:table-cell table:style-name="Table1.C2" office:value-type="float" office:value="1.3125">
              <text:p text:style-name="long_20_table">1 <text:s/>5/16</text:p>
            </table:table-cell>
          </table:table-row>
          <table:table-row table:style-name="Table1.2">
            <table:table-cell table:style-name="Table1.A2" office:value-type="string">
              <text:p text:style-name="long_20_table">E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25">
              <text:p text:style-name="long_20_table">7 <text:s/>1/4 </text:p>
            </table:table-cell>
            <table:table-cell table:style-name="Table1.C2" office:value-type="float" office:value="1.25">
              <text:p text:style-name="long_20_table">1 <text:s/>1/4 </text:p>
            </table:table-cell>
          </table:table-row>
          <table:table-row table:style-name="Table1.2">
            <table:table-cell table:style-name="Table1.A2" office:value-type="string">
              <text:p text:style-name="long_20_table">F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1875">
              <text:p text:style-name="long_20_table">7 <text:s/>3/16</text:p>
            </table:table-cell>
            <table:table-cell table:style-name="Table1.C2" office:value-type="float" office:value="1.1875">
              <text:p text:style-name="long_20_table">1 <text:s/>3/16</text:p>
            </table:table-cell>
          </table:table-row>
          <table:table-row table:style-name="Table1.2">
            <table:table-cell table:style-name="Table1.A2" office:value-type="string">
              <text:p text:style-name="long_20_table">F#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125">
              <text:p text:style-name="long_20_table">7 <text:s/>1/8 </text:p>
            </table:table-cell>
            <table:table-cell table:style-name="Table1.C2" office:value-type="float" office:value="1.125">
              <text:p text:style-name="long_20_table">1 <text:s/>1/8 </text:p>
            </table:table-cell>
          </table:table-row>
          <table:table-row table:style-name="Table1.2">
            <table:table-cell table:style-name="Table1.A2" office:value-type="string">
              <text:p text:style-name="long_20_table">G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.0625">
              <text:p text:style-name="long_20_table">7 <text:s/>1/16</text:p>
            </table:table-cell>
            <table:table-cell table:style-name="Table1.C2" office:value-type="float" office:value="1.0625">
              <text:p text:style-name="long_20_table">1 <text:s/>1/16</text:p>
            </table:table-cell>
          </table:table-row>
          <table:table-row table:style-name="Table1.2">
            <table:table-cell table:style-name="Table1.A2" office:value-type="string">
              <text:p text:style-name="long_20_table">G#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7">
              <text:p text:style-name="long_20_table">7 <text:s text:c="5"/></text:p>
            </table:table-cell>
            <table:table-cell table:style-name="Table1.C2" office:value-type="float" office:value="1">
              <text:p text:style-name="long_20_table">1 <text:s text:c="5"/></text:p>
            </table:table-cell>
          </table:table-row>
          <table:table-row table:style-name="Table1.2">
            <table:table-cell table:style-name="Table1.A2" office:value-type="string">
              <text:p text:style-name="long_20_table">A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6.9375">
              <text:p text:style-name="long_20_table">6 15/16</text:p>
            </table:table-cell>
            <table:table-cell table:style-name="Table1.C2" office:value-type="float" office:value="0.9375">
              <text:p text:style-name="long_20_table"><text:s/>15/16</text:p>
            </table:table-cell>
          </table:table-row>
          <table:table-row table:style-name="Table1.2">
            <table:table-cell table:style-name="Table1.A2" office:value-type="string">
              <text:p text:style-name="long_20_table">A#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6.875">
              <text:p text:style-name="long_20_table">6 <text:s/>7/8 </text:p>
            </table:table-cell>
            <table:table-cell table:style-name="Table1.C2" office:value-type="float" office:value="0.875">
              <text:p text:style-name="long_20_table"><text:s text:c="2"/>7/8 </text:p>
            </table:table-cell>
          </table:table-row>
          <table:table-row table:style-name="Table1.2">
            <table:table-cell table:style-name="Table1.A2" office:value-type="string">
              <text:p text:style-name="long_20_table">B</text:p>
            </table:table-cell>
            <table:table-cell table:style-name="Table1.B14" office:value-type="float" office:value="8">
              <text:p text:style-name="long_20_table">8</text:p>
            </table:table-cell>
            <table:table-cell table:style-name="Table1.C2" office:value-type="float" office:value="6.8125">
              <text:p text:style-name="long_20_table">6 13/16</text:p>
            </table:table-cell>
            <table:table-cell table:style-name="Table1.C2" office:value-type="float" office:value="0.8125">
              <text:p text:style-name="long_20_table"><text:s/>13/16</text:p>
            </table:table-cell>
          </table:table-row>
          <table:table-row table:style-name="Table1.2">
            <table:table-cell table:style-name="Table1.A74" office:value-type="string">
              <text:p text:style-name="long_20_table">C</text:p>
            </table:table-cell>
            <table:table-cell table:style-name="Table1.B74" office:value-type="float" office:value="9">
              <text:p text:style-name="long_20_table">9</text:p>
            </table:table-cell>
            <table:table-cell table:style-name="Table1.C74" office:value-type="float" office:value="6.75">
              <text:p text:style-name="long_20_table">6 <text:s/>3/4 </text:p>
            </table:table-cell>
            <table:table-cell table:style-name="Table1.C74" office:value-type="float" office:value="0.75">
              <text:p text:style-name="long_20_table"><text:s text:c="2"/>3/4 </text:p>
            </table:table-cell>
          </table:table-row>
        </table:table>
        <text:p text:style-name="Text_20_body"/>
      </text:section>
      <text:h text:style-name="P10" text:outline-level="2"><text:span text:style-name="T9">Notes on pipe lengths</text:span></text:h>
      <text:p text:style-name="P6"><text:span text:style-name="T7">In all of Wicks’ rank specifications, he uses a single stopped rank for the lowest octave in the manual range (C2-B2). </text:span><text:span text:style-name="T8">Recall from earlier that stopped pipes sound an octave lower than their actual measured length. </text:span><text:span text:style-name="T9">You can also note that each pipe length measured from the mouth of the pipe </text:span><text:span text:style-name="T10">is, in this scaling, exactly double the length of the pipe of the same pitch an octave higher (e.g., C4 = 24”, C5 = 12”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long_20_table" style:display-name="long table" style:family="paragraph" style:parent-style-name="Table_20_Contents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9">
      <number:fraction number:min-integer-digits="0" number:min-numerator-digits="2" loext:max-numerator-digits="2" number:min-denominator-digits="2" number:max-denominator-value="99"/>
    </number:number-style>
    <number:number-style style:name="N130">
      <number:fraction number:min-integer-digits="0" number:min-numerator-digits="3" loext:max-numerator-digits="3" number:min-denominator-digits="3" number:max-denominator-value="999"/>
    </number:number-style>
    <number:number-style style:name="N131">
      <number:fraction number:min-integer-digits="0" number:min-numerator-digits="2" loext:max-numerator-digits="2" number:denominator-value="32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te Shannon</meta:initial-creator>
    <meta:creation-date>2023-02-26T00:17:27.414000000</meta:creation-date>
    <meta:generator>LibreOffice/7.5.0.3$Windows_X86_64 LibreOffice_project/c21113d003cd3efa8c53188764377a8272d9d6de</meta:generator>
    <dc:date>2023-02-28T19:09:59.062000000</dc:date>
    <dc:creator>Tate Shannon</dc:creator>
    <meta:editing-duration>PT17M35S</meta:editing-duration>
    <meta:editing-cycles>14</meta:editing-cycles>
    <meta:document-statistic meta:table-count="1" meta:image-count="1" meta:object-count="0" meta:page-count="3" meta:paragraph-count="307" meta:word-count="752" meta:character-count="3482" meta:non-whitespace-character-count="2465"/>
  </office:meta>
</office:document-meta>
</file>
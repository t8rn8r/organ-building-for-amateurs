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4e0a2" officeooo:paragraph-rsid="0024e0a2"/>
    </style:style>
    <style:style style:name="P2" style:family="paragraph" style:parent-style-name="Text_20_body">
      <style:text-properties officeooo:rsid="0024e0a2" officeooo:paragraph-rsid="00363d6a"/>
    </style:style>
    <style:style style:name="P3" style:family="paragraph" style:parent-style-name="Text_20_body">
      <style:text-properties officeooo:rsid="002a633d" officeooo:paragraph-rsid="002a633d"/>
    </style:style>
    <style:style style:name="P4" style:family="paragraph" style:parent-style-name="Heading_20_1">
      <style:text-properties officeooo:rsid="0007c9d0" officeooo:paragraph-rsid="0007c9d0"/>
    </style:style>
    <style:style style:name="P5" style:family="paragraph" style:parent-style-name="Heading_20_2">
      <style:text-properties officeooo:rsid="0024e0a2" officeooo:paragraph-rsid="0024e0a2"/>
    </style:style>
    <style:style style:name="P6" style:family="paragraph" style:parent-style-name="Heading_20_3">
      <style:text-properties officeooo:rsid="003833ad" officeooo:paragraph-rsid="003833ad"/>
    </style:style>
    <style:style style:name="P7" style:family="paragraph" style:parent-style-name="Heading_20_3">
      <style:text-properties officeooo:rsid="00352861" officeooo:paragraph-rsid="00352861"/>
    </style:style>
    <style:style style:name="P8" style:family="paragraph" style:parent-style-name="Heading_20_3">
      <style:text-properties officeooo:rsid="0040eb4a" officeooo:paragraph-rsid="0040eb4a"/>
    </style:style>
    <style:style style:name="P9" style:family="paragraph" style:parent-style-name="Text_20_body" style:list-style-name="L1">
      <style:text-properties officeooo:rsid="0007c9d0" officeooo:paragraph-rsid="0007c9d0"/>
    </style:style>
    <style:style style:name="P10" style:family="paragraph" style:parent-style-name="Text_20_body">
      <style:text-properties officeooo:rsid="003a3a65" officeooo:paragraph-rsid="003a3a65"/>
    </style:style>
    <style:style style:name="P11" style:family="paragraph" style:parent-style-name="Text_20_body">
      <style:text-properties officeooo:rsid="003a3a65" officeooo:paragraph-rsid="003d9243"/>
    </style:style>
    <style:style style:name="P12" style:family="paragraph" style:parent-style-name="Text_20_body">
      <style:text-properties officeooo:rsid="002f34f6" officeooo:paragraph-rsid="00352861"/>
    </style:style>
    <style:style style:name="P13" style:family="paragraph" style:parent-style-name="Text_20_body">
      <style:text-properties officeooo:rsid="0040eb4a" officeooo:paragraph-rsid="0040eb4a"/>
    </style:style>
    <style:style style:name="P14" style:family="paragraph" style:parent-style-name="Text_20_body">
      <style:text-properties officeooo:rsid="0043547b" officeooo:paragraph-rsid="0043547b"/>
    </style:style>
    <style:style style:name="P15" style:family="paragraph" style:parent-style-name="Text_20_body">
      <style:text-properties officeooo:rsid="00439c45" officeooo:paragraph-rsid="00439c45"/>
    </style:style>
    <style:style style:name="P16" style:family="paragraph" style:parent-style-name="Text_20_body">
      <style:text-properties officeooo:rsid="0043abe6" officeooo:paragraph-rsid="0043abe6"/>
    </style:style>
    <style:style style:name="T1" style:family="text">
      <style:text-properties officeooo:rsid="0007c9d0"/>
    </style:style>
    <style:style style:name="T2" style:family="text">
      <style:text-properties officeooo:rsid="0025b5bf"/>
    </style:style>
    <style:style style:name="T3" style:family="text">
      <style:text-properties officeooo:rsid="0025cf6b"/>
    </style:style>
    <style:style style:name="T4" style:family="text">
      <style:text-properties officeooo:rsid="002b0474"/>
    </style:style>
    <style:style style:name="T5" style:family="text">
      <style:text-properties officeooo:rsid="002b1f84"/>
    </style:style>
    <style:style style:name="T6" style:family="text">
      <style:text-properties officeooo:rsid="002cb46a"/>
    </style:style>
    <style:style style:name="T7" style:family="text">
      <style:text-properties officeooo:rsid="002e37cd"/>
    </style:style>
    <style:style style:name="T8" style:family="text">
      <style:text-properties officeooo:rsid="003299e3"/>
    </style:style>
    <style:style style:name="T9" style:family="text">
      <style:text-properties fo:font-style="italic" officeooo:rsid="00336e31" style:font-style-asian="italic" style:font-style-complex="italic"/>
    </style:style>
    <style:style style:name="T10" style:family="text">
      <style:text-properties fo:font-style="italic" officeooo:rsid="003d9243" style:font-style-asian="italic" style:font-style-complex="italic"/>
    </style:style>
    <style:style style:name="T11" style:family="text">
      <style:text-properties fo:language="el" fo:country="GR" fo:font-style="italic" officeooo:rsid="00336e31" style:font-style-asian="italic" style:font-style-complex="italic"/>
    </style:style>
    <style:style style:name="T12" style:family="text">
      <style:text-properties fo:language="en" fo:country="US" fo:font-style="italic" officeooo:rsid="00336e31" style:font-style-asian="italic" style:font-style-complex="italic"/>
    </style:style>
    <style:style style:name="T13" style:family="text">
      <style:text-properties fo:language="en" fo:country="US" fo:font-style="normal" officeooo:rsid="00336e31" style:font-style-asian="normal" style:font-style-complex="normal"/>
    </style:style>
    <style:style style:name="T14" style:family="text">
      <style:text-properties fo:language="en" fo:country="US" fo:font-style="normal" officeooo:rsid="0034a4c9" style:font-style-asian="normal" style:font-style-complex="normal"/>
    </style:style>
    <style:style style:name="T15" style:family="text">
      <style:text-properties fo:language="en" fo:country="US" fo:font-style="normal" officeooo:rsid="00352861" style:font-style-asian="normal" style:font-style-complex="normal"/>
    </style:style>
    <style:style style:name="T16" style:family="text">
      <style:text-properties style:font-name="Liberation Serif" fo:language="el" fo:country="GR" fo:font-style="italic" officeooo:rsid="00336e31" style:font-style-asian="italic" style:font-style-complex="italic"/>
    </style:style>
    <style:style style:name="T17" style:family="text">
      <style:text-properties officeooo:rsid="00363d6a"/>
    </style:style>
    <style:style style:name="T18" style:family="text">
      <style:text-properties officeooo:rsid="003833ad"/>
    </style:style>
    <style:style style:name="T19" style:family="text">
      <style:text-properties officeooo:rsid="003a3a65"/>
    </style:style>
    <style:style style:name="T20" style:family="text">
      <style:text-properties officeooo:rsid="003d9243"/>
    </style:style>
    <style:style style:name="T21" style:family="text">
      <style:text-properties fo:font-style="normal" officeooo:rsid="003d9243" style:font-style-asian="normal" style:font-style-complex="normal"/>
    </style:style>
    <style:style style:name="T22" style:family="text">
      <style:text-properties fo:font-style="normal" officeooo:rsid="003eae6e" style:font-style-asian="normal" style:font-style-complex="normal"/>
    </style:style>
    <style:style style:name="T23" style:family="text">
      <style:text-properties officeooo:rsid="0042c5d1"/>
    </style:style>
    <style:style style:name="T24" style:family="text">
      <style:text-properties officeooo:rsid="00439c4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4" text:outline-level="1">Wicks’ method to make paper organ pipes</text:h>
      <text:p text:style-name="P1">Wicks contrived this system of making organ pipes to make it easier and cheaper for the amateur to build their first organ pipes. These paper pipes are meant to imitate metal pipes, but without the need for expensive and difficult metalworking techniques. <text:span text:style-name="T1">Wicks lists several advantages to his system for making paper organ pipes:</text:span></text:p>
      <text:list text:style-name="L1">
        <text:list-item>
          <text:p text:style-name="P9">They’re cheap. Really, really cheap.</text:p>
        </text:list-item>
        <text:list-item>
          <text:p text:style-name="P9">They’re very light.</text:p>
        </text:list-item>
        <text:list-item>
          <text:p text:style-name="P9">They’re easy to make.</text:p>
        </text:list-item>
        <text:list-item>
          <text:p text:style-name="P9">They require no special tools.</text:p>
        </text:list-item>
        <text:list-item>
          <text:p text:style-name="P9">They have no risk of air leakage since they don’t have long seams.</text:p>
        </text:list-item>
        <text:list-item>
          <text:p text:style-name="P9">They take up the same space as metal pipes.</text:p>
        </text:list-item>
        <text:list-item>
          <text:p text:style-name="P9">They are stronger than metal pipes, and aren’t as easily damaged. </text:p>
        </text:list-item>
        <text:list-item>
          <text:p text:style-name="P9">You can test your pipes before their completion to ensure they will sound.</text:p>
        </text:list-item>
      </text:list>
      <text:p text:style-name="P3">In practice, this technique has been used in some <text:span text:style-name="T4">historical organs, but </text:span><text:span text:style-name="T5">hasn’t been </text:span><text:span text:style-name="T6">widely adopted by any major organ builder that I know of. Regardless, making paper pipes is a great way to get into building your own pipe organ.</text:span></text:p>
      <text:h text:style-name="P5" text:outline-level="2">Making your first pipe</text:h>
      <text:p text:style-name="P2">Wicks suggests starting <text:span text:style-name="T17">by making a single </text:span><text:span text:style-name="T2">pipe that sounds at G5. </text:span><text:span text:style-name="T17">In the future, you’ll make several sets of pipes at the same time, but the educational and practical value of making a single pipe before investing time and effort into maximizing efficiency of production far outweighs the </text:span><text:span text:style-name="T18">small amount of time it takes to make. Consider this the “practice round”. Even if you fail, you’ll still end up with a fun keepsake!</text:span></text:p>
      <text:h text:style-name="P6" text:outline-level="3">Using the scale</text:h>
      <text:p text:style-name="P2"><text:span text:style-name="T2">According to </text:span><text:span text:style-name="T7">the scale you made in a previous chapter</text:span><text:span text:style-name="T2">, </text:span><text:span text:style-name="T18">go to the row for </text:span><text:span text:style-name="T2">G5 </text:span><text:span text:style-name="T19">to find that it</text:span><text:span text:style-name="T2"> has a speaking length (the length above the mouth of the pipe) of 8-1/2” and a diameter of 23/32”. </text:span><text:span text:style-name="T3">Don’t worry too much about getting the diameter of the pipe within a 1/32” tolerance. If you make it 3/4” or 11/16” it will make no audible difference in the finished product.</text:span></text:p>
      <text:h text:style-name="P7" text:outline-level="3">Forming a mandrel</text:h>
      <text:p text:style-name="P10">You will wrap paper around a mandrel to form your pipe. The mandrel should be the exact diameter of the desired pipe, according to the scale you use. For our pipe of 23/32” diameter, we want to make a mandrel of 23/32”. </text:p>
      <text:p text:style-name="P11"><text:soft-page-break/>First, take a dowel with a <text:span text:style-name="T20">diameter smaller than the desired pipe and a length much longer than the desired pipe and wrap paper (from a paper roll) around it until it measures exactly 23/32” in diameter. </text:span><text:span text:style-name="T10">This paper is not your pipe. It is your mandrel.</text:span><text:span text:style-name="T21"> Wrap it tightly and evenly so that it forms a perfect cylinder.</text:span></text:p>
      <text:p text:style-name="P11"><text:span text:style-name="T21">Once you achieve the desired diameter, cut the paper from the </text:span><text:span text:style-name="T22">paper </text:span><text:span text:style-name="T21">roll then glue or tape the edge </text:span><text:span text:style-name="T22">on your mandrel so that you’re left with a cylinder with the exact diameter of your pipe.</text:span></text:p>
      <text:h text:style-name="P7" text:outline-level="3">Calculating circumference</text:h>
      <text:p text:style-name="P12">First, let’s do some math. The circumference of the pipe is given b<text:span text:style-name="T8">y </text:span><text:span text:style-name="T9">circumference = </text:span><text:span text:style-name="T11">π </text:span><text:span text:style-name="T16">×</text:span><text:span text:style-name="T12"> diameter</text:span><text:span text:style-name="T13">. Therefore, the circumference of this pipe is </text:span><text:span text:style-name="T14">very close to 2-1/4”. </text:span><text:span text:style-name="T15">We’ll use this number for the rest of our calculations below.</text:span></text:p>
      <text:h text:style-name="P8" text:outline-level="3">Forming the pipe</text:h>
      <text:p text:style-name="P13">Now it’s time to make your pipe. Using the paper you intend to use for your pipework, cut a piece that is slightly wider than your finished pipe is long. For G5, which is 8-1/2” long, cut the paper about 9” wide. Cut the paper long enough to go around the mandrel about 4 times around the mandrel. For a circumference of 2-1/4”, <text:span text:style-name="T23">that length is 9”. (It’s convenient that this pipe uses a square piece of paper. No other pipes will come out this way.)</text:span></text:p>
      <text:p text:style-name="P14">Mark the distance one circumference (2-1/4” in this case) from the edge of the paper. You can use measuring tools, or simply wrap the paper once around the mandrel for this. <text:span text:style-name="T24">Spread glue on the remaining 7-3/4” of paper and let the glue soak into the paper for a little bit, but don’t let it dry. </text:span></text:p>
      <text:p text:style-name="P15">Finally, wrap the paper around the mandrel so that the part with no glue is in direct contact with the surface of the mandrel. If you fail to do this, your pipe will be glued to the mandrel and never come off. </text:p>
      <text:p text:style-name="P16">Press firmly all around your newly formed pipe while its still on the mandrel. You can do this by rolling it against your workbench like a rolling p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ate Shannon</meta:initial-creator>
    <meta:creation-date>2023-02-25T14:05:16.800000000</meta:creation-date>
    <meta:generator>LibreOffice/7.5.0.3$Windows_X86_64 LibreOffice_project/c21113d003cd3efa8c53188764377a8272d9d6de</meta:generator>
    <dc:date>2023-02-28T20:01:10.534000000</dc:date>
    <dc:creator>Tate Shannon</dc:creator>
    <meta:editing-duration>PT8H33M34S</meta:editing-duration>
    <meta:editing-cycles>27</meta:editing-cycles>
    <meta:document-statistic meta:table-count="0" meta:image-count="0" meta:object-count="0" meta:page-count="2" meta:paragraph-count="26" meta:word-count="722" meta:character-count="3904" meta:non-whitespace-character-count="3212"/>
  </office:meta>
</office:document-meta>
</file>